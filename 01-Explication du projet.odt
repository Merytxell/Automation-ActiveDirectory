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9828" officeooo:paragraph-rsid="000e9828"/>
    </style:style>
    <style:style style:name="P2" style:family="paragraph" style:parent-style-name="Text_20_body">
      <style:paragraph-properties fo:text-align="center" style:justify-single-word="false"/>
      <style:text-properties style:font-name="Calibri Light" officeooo:rsid="000e9828" officeooo:paragraph-rsid="000fc789"/>
    </style:style>
    <style:style style:name="P3" style:family="paragraph" style:parent-style-name="Text_20_body">
      <style:paragraph-properties fo:margin-top="0cm" fo:margin-bottom="0cm" style:contextual-spacing="false"/>
      <style:text-properties style:font-name="Calibri Light" officeooo:rsid="000fc789"/>
    </style:style>
    <style:style style:name="P4" style:family="paragraph" style:parent-style-name="Text_20_body">
      <style:paragraph-properties fo:text-align="center" style:justify-single-word="false"/>
      <style:text-properties style:font-name="Calibri Light" officeooo:rsid="000fc789" officeooo:paragraph-rsid="000fc789"/>
    </style:style>
    <style:style style:name="P5" style:family="paragraph" style:parent-style-name="Text_20_body" style:list-style-name="L1">
      <style:paragraph-properties fo:margin-top="0cm" fo:margin-bottom="0cm" style:contextual-spacing="false" fo:text-align="center" style:justify-single-word="false"/>
      <style:text-properties style:font-name="Calibri Light" officeooo:rsid="000e9828" officeooo:paragraph-rsid="000fc789"/>
    </style:style>
    <style:style style:name="P6" style:family="paragraph" style:parent-style-name="Text_20_body" style:list-style-name="L1">
      <style:paragraph-properties fo:margin-top="0cm" fo:margin-bottom="0cm" style:contextual-spacing="false" fo:text-align="center" style:justify-single-word="false"/>
      <style:text-properties style:font-name="Calibri Light" officeooo:rsid="000fc789" officeooo:paragraph-rsid="000fc789"/>
    </style:style>
    <style:style style:name="P7" style:family="paragraph" style:parent-style-name="Text_20_body" style:list-style-name="L2">
      <style:paragraph-properties fo:margin-top="0cm" fo:margin-bottom="0cm" style:contextual-spacing="false" fo:text-align="center" style:justify-single-word="false"/>
      <style:text-properties style:font-name="Calibri Light" officeooo:rsid="000e9828" officeooo:paragraph-rsid="000fc789"/>
    </style:style>
    <style:style style:name="P8" style:family="paragraph" style:parent-style-name="Text_20_body">
      <style:paragraph-properties fo:text-align="center" style:justify-single-word="false"/>
      <style:text-properties style:font-name="Calibri Light" fo:font-weight="bold" officeooo:rsid="000fc789" officeooo:paragraph-rsid="000fc789" style:font-weight-asian="bold" style:font-weight-complex="bold"/>
    </style:style>
    <style:style style:name="P9" style:family="paragraph" style:parent-style-name="Text_20_body" style:list-style-name="L3">
      <style:paragraph-properties fo:margin-top="0cm" fo:margin-bottom="0cm" style:contextual-spacing="false" fo:text-align="center" style:justify-single-word="false"/>
      <style:text-properties style:font-name="Calibri Light" officeooo:rsid="000e9828" officeooo:paragraph-rsid="000fc789"/>
    </style:style>
    <style:style style:name="P10" style:family="paragraph" style:parent-style-name="Text_20_body" style:list-style-name="L3">
      <style:paragraph-properties fo:text-align="center" style:justify-single-word="false"/>
      <style:text-properties style:font-name="Calibri Light" officeooo:rsid="000e9828" officeooo:paragraph-rsid="000fc789"/>
    </style:style>
    <style:style style:name="P11" style:family="paragraph" style:parent-style-name="Text_20_body" style:list-style-name="L4">
      <style:paragraph-properties fo:margin-top="0cm" fo:margin-bottom="0cm" style:contextual-spacing="false" fo:text-align="center" style:justify-single-word="false"/>
      <style:text-properties style:font-name="Calibri Light" officeooo:rsid="000e9828" officeooo:paragraph-rsid="000fc789"/>
    </style:style>
    <style:style style:name="P12" style:family="paragraph" style:parent-style-name="Text_20_body">
      <style:paragraph-properties fo:margin-top="0cm" fo:margin-bottom="0cm" style:contextual-spacing="false" fo:text-align="center" style:justify-single-word="false"/>
      <style:text-properties style:font-name="Calibri Light" officeooo:rsid="000e9828" officeooo:paragraph-rsid="000fc789"/>
    </style:style>
    <style:style style:name="P13" style:family="paragraph" style:parent-style-name="Text_20_body">
      <style:paragraph-properties fo:margin-top="0cm" fo:margin-bottom="0cm" style:contextual-spacing="false"/>
      <style:text-properties style:font-name="Calibri Light" officeooo:rsid="000e9828"/>
    </style:style>
    <style:style style:name="P14" style:family="paragraph" style:parent-style-name="Text_20_body">
      <style:text-properties style:font-name="Calibri Light" officeooo:rsid="000e9828"/>
    </style:style>
    <style:style style:name="P15" style:family="paragraph" style:parent-style-name="Text_20_body">
      <style:paragraph-properties fo:margin-top="0cm" fo:margin-bottom="0cm" style:contextual-spacing="false"/>
      <style:text-properties officeooo:rsid="000e9828"/>
    </style:style>
    <style:style style:name="T1" style:family="text">
      <style:text-properties style:font-name="Calibri Light"/>
    </style:style>
    <style:style style:name="T2" style:family="text">
      <style:text-properties officeooo:rsid="000fc789"/>
    </style:style>
    <style:style style:name="T3" style:family="text">
      <style:text-properties style:font-name="Calibri Light" officeooo:rsid="000e982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xplication du projet</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index-body>
      </text:table-of-content>
      <text:p text:style-name="P2"/>
      <text:p text:style-name="P3"/>
      <text:p text:style-name="P4">Contexte </text:p>
      <text:p text:style-name="P4">Architecture</text:p>
      <text:list text:style-name="L1">
        <text:list-item>
          <text:p text:style-name="P5">Schéma de ton lab </text:p>
        </text:list-item>
        <text:list-item>
          <text:p text:style-name="P5">VM Windows Server </text:p>
        </text:list-item>
        <text:list-item>
          <text:p text:style-name="P5">VM Windows Client </text:p>
        </text:list-item>
        <text:list-item>
          <text:p text:style-name="P5">VM Linux </text:p>
        </text:list-item>
        <text:list-item>
          <text:p text:style-name="P6">réseau</text:p>
        </text:list-item>
      </text:list>
      <text:p text:style-name="P4">Scripts développés</text:p>
      <text:p text:style-name="P4"/>
      <text:list text:style-name="L2">
        <text:list-item>
          <text:p text:style-name="P7">Création d'utilisateurs AD </text:p>
        </text:list-item>
        <text:list-item>
          <text:p text:style-name="P7">Création de groupes </text:p>
        </text:list-item>
        <text:list-item>
          <text:p text:style-name="P7">Création d'OU </text:p>
        </text:list-item>
        <text:list-item>
          <text:p text:style-name="P7">Sauvegarde </text:p>
        </text:list-item>
        <text:list-item>
          <text:p text:style-name="P7">Bash côté Linux </text:p>
        </text:list-item>
      </text:list>
      <text:p text:style-name="P8"/>
      <text:p text:style-name="P8">Tests</text:p>
      <text:list text:style-name="L3">
        <text:list-item>
          <text:p text:style-name="P9">Avant </text:p>
        </text:list-item>
        <text:list-item>
          <text:p text:style-name="P9">Après </text:p>
        </text:list-item>
        <text:list-item>
          <text:p text:style-name="P9">Capture d'écran </text:p>
        </text:list-item>
        <text:list-item>
          <text:p text:style-name="P10">Résultat </text:p>
        </text:list-item>
      </text:list>
      <text:list text:style-name="L4">
        <text:list-header>
          <text:p text:style-name="P11"><text:span text:style-name="Strong_20_Emphasis"/></text:p>
        </text:list-header>
      </text:list>
      <text:p text:style-name="P12"><text:span text:style-name="Strong_20_Emphasis"><text:span text:style-name="T2">Conclusion</text:span></text:span></text:p>
      <text:p text:style-name="P12"><text:span text:style-name="Strong_20_Emphasis"><text:span text:style-name="T3"/></text:spa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h text:style-name="Heading_20_1" text:outline-level="1"><text:soft-page-break/><text:span text:style-name="Strong_20_Emphasis">Contexte</text:span></text:h>
      <text:p text:style-name="Text_20_body"><text:span text:style-name="Strong_20_Emphasis"/></text:p>
      <text:p text:style-name="P14">L'administration des systèmes d'information implique de nombreuses tâches répétitives telles que la création de comptes utilisateurs, la gestion des groupes, l'attribution des droits ou encore la maintenance des serveurs. Réalisées manuellement, ces opérations peuvent être chronophages et source d'erreurs.</text:p>
      <text:p text:style-name="P14">Dans ce contexte, l'automatisation constitue une réponse efficace pour standardiser les procédures, améliorer la fiabilité des opérations et optimiser le temps consacré à l'administration.</text:p>
      <text:p text:style-name="P14">Ce projet a pour objectif de concevoir un laboratoire virtuel reposant sur Windows Server et Ubuntu Server afin de développer des scripts PowerShell et Bash destinés à automatiser différentes tâches d'administration.</text:p>
      <text:p text:style-name="P14">Au-delà de l'aspect technique, ce projet s'inscrit dans une démarche de montée en compétences sur des technologies largement utilisées en entreprise. Il répond également à une volonté de développer des pratiques d'administration plus efficaces, tout en renforçant mon employabilité dans les domaines de l'administration systèmes, du DevOps et du Cloud.</text:p>
      <text:p text:style-name="P1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21T16:02:39.215008700</meta:creation-date>
    <dc:date>2026-07-21T16:08:04.598014800</dc:date>
    <meta:editing-duration>PT5M25S</meta:editing-duration>
    <meta:editing-cycles>2</meta:editing-cycles>
    <meta:generator>LibreOffice/26.2.4.2$Windows_X86_64 LibreOffice_project/0229ac93fcf0d7cbc6376066c6f35021cef002dc</meta:generator>
    <meta:document-statistic meta:table-count="0" meta:image-count="0" meta:object-count="0" meta:page-count="2" meta:paragraph-count="27" meta:word-count="202" meta:character-count="1373" meta:non-whitespace-character-count="1198"/>
  </office:meta>
</office:document-meta>
</file>