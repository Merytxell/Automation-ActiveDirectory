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>
      <style:paragraph-properties fo:margin-top="0cm" fo:margin-bottom="0cm" style:contextual-spacing="false"/>
    </style:style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>
      <style:paragraph-properties fo:margin-top="0cm" fo:margin-bottom="0cm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Heading_20_1">
      <style:paragraph-properties fo:margin-top="0cm" fo:margin-bottom="0.247cm" style:contextual-spacing="false" fo:line-height="115%"/>
    </style:style>
    <style:style style:name="P21" style:family="paragraph" style:parent-style-name="Heading_20_2">
      <style:paragraph-properties fo:margin-top="0cm" fo:margin-bottom="0.247cm" style:contextual-spacing="false" fo:line-height="115%"/>
    </style:style>
    <style:style style:name="P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23" style:family="paragraph" style:parent-style-name="Preformatted_20_Text">
      <style:paragraph-properties fo:margin-top="0cm" fo:margin-bottom="0.247cm" style:contextual-spacing="false" fo:line-height="115%"/>
    </style:style>
    <style:style style:name="P24" style:family="paragraph" style:parent-style-name="Horizontal_20_Line">
      <style:paragraph-properties fo:margin-top="0cm" fo:margin-bottom="0.247cm" style:contextual-spacing="false" fo:line-height="115%"/>
    </style:style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Installation du rôle AD DS </text:p>
        </text:list-item>
      </text:list>
      <text:list text:style-name="L2">
        <text:list-item>
          <text:p text:style-name="P2">Ajout du rôle </text:p>
        </text:list-item>
        <text:list-item>
          <text:p text:style-name="P3">Installation des fonctionnalités </text:p>
        </text:list-item>
      </text:list>
      <text:list text:style-name="L3">
        <text:list-item>
          <text:p text:style-name="P4">Promotion en contrôleur de domaine </text:p>
        </text:list-item>
      </text:list>
      <text:list text:style-name="L4">
        <text:list-item>
          <text:p text:style-name="P5">Création du domaine </text:p>
        </text:list-item>
        <text:list-item>
          <text:p text:style-name="P5">Mot de passe DSRM </text:p>
        </text:list-item>
        <text:list-item>
          <text:p text:style-name="P6">Vérifications </text:p>
        </text:list-item>
      </text:list>
      <text:list text:style-name="L5">
        <text:list-item>
          <text:p text:style-name="P7">Organisation de l'annuaire </text:p>
        </text:list-item>
      </text:list>
      <text:list text:style-name="L6">
        <text:list-item>
          <text:p text:style-name="P8">Création des OU </text:p>
        </text:list-item>
        <text:list-item>
          <text:p text:style-name="P8">Arborescence choisie </text:p>
        </text:list-item>
        <text:list-item>
          <text:p text:style-name="P9">Justification </text:p>
        </text:list-item>
      </text:list>
      <text:list text:style-name="L7">
        <text:list-item>
          <text:p text:style-name="P10">Création des groupes </text:p>
        </text:list-item>
      </text:list>
      <text:list text:style-name="L8">
        <text:list-item>
          <text:p text:style-name="P11">Groupes de sécurité </text:p>
        </text:list-item>
        <text:list-item>
          <text:p text:style-name="P12">Convention de nommage </text:p>
        </text:list-item>
      </text:list>
      <text:list text:style-name="L9">
        <text:list-item>
          <text:p text:style-name="P13">Création des utilisateurs </text:p>
        </text:list-item>
      </text:list>
      <text:list text:style-name="L10">
        <text:list-item>
          <text:p text:style-name="P14">Utilisateurs de test </text:p>
        </text:list-item>
        <text:list-item>
          <text:p text:style-name="P15">Vérifications </text:p>
        </text:list-item>
      </text:list>
      <text:list text:style-name="L11">
        <text:list-item>
          <text:p text:style-name="P16">Validation </text:p>
        </text:list-item>
      </text:list>
      <text:list text:style-name="L12">
        <text:list-item>
          <text:p text:style-name="P17">Vérification de la réplication (si besoin) </text:p>
        </text:list-item>
        <text:list-item>
          <text:p text:style-name="P17">Vérification DNS </text:p>
        </text:list-item>
        <text:list-item>
          <text:p text:style-name="P18">Tests de connexion </text:p>
        </text:list-item>
      </text:list>
      <text:list text:style-name="L13">
        <text:list-item>
          <text:p text:style-name="P19">Conclusion </text:p>
        </text:list-item>
      </text:list>
      <text:p text:style-name="Text_20_body"/>
      <text:p text:style-name="Text_20_body"/>
      <text:h text:style-name="P20" text:outline-level="1">Installation d'Active Directory (AD DS)</text:h>
      <text:h text:style-name="P21" text:outline-level="2">Étape 1 - Ouvrir l'assistant</text:h>
      <text:p text:style-name="Text_20_body">Dans <text:span text:style-name="Strong_20_Emphasis">Server Manager</text:span> :</text:p>
      <text:section text:style-name="Sect1" text:name="code-block-viewer">
        <text:p text:style-name="P22"><text:span text:style-name="Source_20_Text">Manage</text:span></text:p>
        <text:p text:style-name="P23"><text:span text:style-name="Source_20_Text"><text:s text:c="4"/>↓</text:span></text:p>
        <text:p text:style-name="P23"><text:span text:style-name="Source_20_Text">Add Roles and Features</text:span></text:p>
      </text:section>
      <text:p text:style-name="P24"/>
      <text:h text:style-name="P21" text:outline-level="2">Étape 2 - Before you begin</text:h>
      <text:p text:style-name="Text_20_body">Clique simplement sur :</text:p>
      <text:section text:style-name="Sect1" text:name="Section1">
        <text:p text:style-name="P22"><text:bookmark text:name="code-block-viewer"/><text:span text:style-name="Source_20_Text">Next</text:span></text:p>
      </text:section>
      <text:p text:style-name="Text_20_body"><text:soft-page-break/>Tu peux cocher :</text:p>
      <text:section text:style-name="Sect1" text:name="Section2">
        <text:p text:style-name="P22"><text:bookmark text:name="code-block-viewer Copie 1"/><text:span text:style-name="Source_20_Text">☑ Skip this page by default</text:span></text:p>
      </text:section>
      <text:p text:style-name="Text_20_body">si tu le souhaites.</text:p>
      <text:p text:style-name="P24"/>
      <text:h text:style-name="P21" text:outline-level="2">Étape 3 - Installation Type</text:h>
      <text:p text:style-name="Text_20_body">Choisir :</text:p>
      <text:section text:style-name="Sect1" text:name="Section3">
        <text:p text:style-name="P22"><text:bookmark text:name="code-block-viewer Copie 2"/><text:span text:style-name="Source_20_Text">Role-based or feature-based installation</text:span></text:p>
      </text:section>
      <text:p text:style-name="Text_20_body">Puis :</text:p>
      <text:section text:style-name="Sect1" text:name="Section4">
        <text:p text:style-name="P22"><text:bookmark text:name="code-block-viewer Copie 3"/><text:span text:style-name="Source_20_Text">Next</text:span></text:p>
      </text:section>
      <text:p text:style-name="P24"/>
      <text:h text:style-name="P21" text:outline-level="2">Étape 4 - Server Selection</text:h>
      <text:p text:style-name="Text_20_body">Le serveur doit déjà être sélectionné.</text:p>
      <text:p text:style-name="Text_20_body">Tu dois voir quelque chose comme :</text:p>
      <text:section text:style-name="Sect1" text:name="Section5">
        <text:p text:style-name="P22"><text:bookmark text:name="code-block-viewer Copie 4"/><text:span text:style-name="Source_20_Text">SRV-AD01</text:span></text:p>
      </text:section>
      <text:p text:style-name="Text_20_body">Puis :</text:p>
      <text:section text:style-name="Sect1" text:name="Section6">
        <text:p text:style-name="P22"><text:bookmark text:name="code-block-viewer Copie 5"/><text:span text:style-name="Source_20_Text">Next</text:span></text:p>
      </text:section>
      <text:p text:style-name="P24"/>
      <text:h text:style-name="P21" text:outline-level="2">Étape 5 - Server Roles</text:h>
      <text:p text:style-name="Text_20_body">Cocher :</text:p>
      <text:section text:style-name="Sect1" text:name="Section7">
        <text:p text:style-name="P22"><text:bookmark text:name="code-block-viewer Copie 6"/><text:span text:style-name="Source_20_Text">☑ Active Directory Domain Services</text:span></text:p>
      </text:section>
      <text:p text:style-name="Text_20_body">Une fenêtre apparaît.</text:p>
      <text:p text:style-name="Text_20_body">Cliquer sur :</text:p>
      <text:section text:style-name="Sect1" text:name="Section8">
        <text:p text:style-name="P22"><text:bookmark text:name="code-block-viewer Copie 7"/><text:span text:style-name="Source_20_Text">Add Features</text:span></text:p>
      </text:section>
      <text:p text:style-name="Text_20_body">Puis :</text:p>
      <text:section text:style-name="Sect1" text:name="Section9">
        <text:p text:style-name="P22"><text:bookmark text:name="code-block-viewer Copie 8"/><text:span text:style-name="Source_20_Text">Next</text:span></text:p>
      </text:section>
      <text:p text:style-name="P24"/>
      <text:h text:style-name="P21" text:outline-level="2">Étape 6 - Features</text:h>
      <text:p text:style-name="Text_20_body">Ne rien modifier.</text:p>
      <text:section text:style-name="Sect1" text:name="Section10">
        <text:p text:style-name="P22"><text:bookmark text:name="code-block-viewer Copie 9"/><text:span text:style-name="Source_20_Text">Next</text:span></text:p>
      </text:section>
      <text:p text:style-name="P24"/>
      <text:h text:style-name="P21" text:outline-level="2">Étape 7 - AD DS</text:h>
      <text:p text:style-name="Text_20_body">Petit écran d'information.</text:p>
      <text:section text:style-name="Sect1" text:name="Section11">
        <text:p text:style-name="P22"><text:bookmark text:name="code-block-viewer Copie 10"/><text:span text:style-name="Source_20_Text">Next</text:span></text:p>
      </text:section>
      <text:p text:style-name="P24"><text:soft-page-break/></text:p>
      <text:h text:style-name="P21" text:outline-level="2">Étape 8 - Confirmation</text:h>
      <text:p text:style-name="Text_20_body">Tu peux cocher :</text:p>
      <text:section text:style-name="Sect1" text:name="Section12">
        <text:p text:style-name="P22"><text:bookmark text:name="code-block-viewer Copie 11"/><text:span text:style-name="Source_20_Text">☑ Restart automatically if required</text:span></text:p>
      </text:section>
      <text:p text:style-name="Text_20_body">(pour une VM ce n'est pas gênant)</text:p>
      <text:p text:style-name="Text_20_body">Puis :</text:p>
      <text:section text:style-name="Sect1" text:name="Section13">
        <text:p text:style-name="P22"><text:bookmark text:name="code-block-viewer Copie 12"/><text:span text:style-name="Source_20_Text">Install</text:span></text:p>
      </text:section>
      <text:p text:style-name="Text_20_body">Attendre la fin.</text:p>
      <text:p text:style-name="Text_20_body">⚠ <text:span text:style-name="Strong_20_Emphasis">Ne ferme pas Server Manager.</text:span></text:p>
      <text:p text:style-name="P24"/>
      <text:h text:style-name="P20" text:outline-level="1">Promotion en contrôleur de domaine</text:h>
      <text:p text:style-name="Text_20_body">Quand l'installation est terminée :</text:p>
      <text:p text:style-name="Text_20_body">En haut à droite apparaît un petit <text:span text:style-name="Strong_20_Emphasis">drapeau jaune</text:span>.</text:p>
      <text:p text:style-name="Text_20_body">Cliquer dessus.</text:p>
      <text:p text:style-name="Text_20_body">Puis :</text:p>
      <text:section text:style-name="Sect1" text:name="Section14">
        <text:p text:style-name="P22"><text:bookmark text:name="code-block-viewer Copie 13"/><text:span text:style-name="Source_20_Text">Promote this server to a domain controller</text:span></text:p>
      </text:section>
      <text:p text:style-name="P24"/>
      <text:h text:style-name="P20" text:outline-level="1">Deployment Configuration</text:h>
      <text:p text:style-name="Text_20_body">Choisir :</text:p>
      <text:section text:style-name="Sect1" text:name="Section15">
        <text:p text:style-name="P22"><text:bookmark text:name="code-block-viewer Copie 14"/><text:span text:style-name="Source_20_Text">Add a new forest</text:span></text:p>
      </text:section>
      <text:p text:style-name="Text_20_body">Puis saisir le domaine.</text:p>
      <text:p text:style-name="Text_20_body">Je te conseille par exemple :</text:p>
      <text:section text:style-name="Sect1" text:name="Section16">
        <text:p text:style-name="P22"><text:bookmark text:name="code-block-viewer Copie 15"/><text:span text:style-name="Source_20_Text">lab.local</text:span></text:p>
      </text:section>
      <text:p text:style-name="Text_20_body">ou</text:p>
      <text:section text:style-name="Sect1" text:name="Section17">
        <text:p text:style-name="P22"><text:bookmark text:name="code-block-viewer Copie 16"/><text:span text:style-name="Source_20_Text">ad.lab</text:span></text:p>
      </text:section>
      <text:p text:style-name="Text_20_body">Personnellement, pour un labo, j'aime bien <text:span text:style-name="Strong_20_Emphasis">lab.local</text:span> : c'est simple et immédiatement compréhensible.</text:p>
      <text:p text:style-name="Text_20_body">Puis :</text:p>
      <text:section text:style-name="Sect1" text:name="Section18">
        <text:p text:style-name="P22"><text:bookmark text:name="code-block-viewer Copie 17"/><text:span text:style-name="Source_20_Text">Next</text:span></text:p>
      </text:section>
      <text:p text:style-name="P24"/>
      <text:h text:style-name="P20" text:outline-level="1">Domain Controller Options</text:h>
      <text:p text:style-name="Text_20_body">Laisser :</text:p>
      <text:section text:style-name="Sect1" text:name="Section19">
        <text:p text:style-name="P22"><text:bookmark text:name="code-block-viewer Copie 18"/><text:soft-page-break/><text:span text:style-name="Source_20_Text">Forest Functional Level</text:span></text:p>
        <text:p text:style-name="P23"><text:span text:style-name="Source_20_Text">Windows Server 2022</text:span></text:p>
      </text:section>
      <text:section text:style-name="Sect1" text:name="Section20">
        <text:p text:style-name="P22"><text:bookmark text:name="code-block-viewer Copie 19"/><text:span text:style-name="Source_20_Text">Domain Functional Level</text:span></text:p>
        <text:p text:style-name="P23"><text:span text:style-name="Source_20_Text">Windows Server 2022</text:span></text:p>
      </text:section>
      <text:p text:style-name="Text_20_body">Cocher :</text:p>
      <text:section text:style-name="Sect1" text:name="Section21">
        <text:p text:style-name="P22"><text:bookmark text:name="code-block-viewer Copie 20"/><text:span text:style-name="Source_20_Text">☑ DNS Server</text:span></text:p>
      </text:section>
      <text:section text:style-name="Sect1" text:name="Section22">
        <text:p text:style-name="P22"><text:bookmark text:name="code-block-viewer Copie 21"/><text:span text:style-name="Source_20_Text">☑ Global Catalog</text:span></text:p>
      </text:section>
      <text:p text:style-name="Text_20_body">Ne pas cocher :</text:p>
      <text:section text:style-name="Sect1" text:name="Section23">
        <text:p text:style-name="P22"><text:bookmark text:name="code-block-viewer Copie 22"/><text:span text:style-name="Source_20_Text">☐ Read Only Domain Controller</text:span></text:p>
      </text:section>
      <text:p text:style-name="P24"/>
      <text:h text:style-name="P21" text:outline-level="2">Mot de passe DSRM</text:h>
      <text:p text:style-name="Text_20_body">Choisir un mot de passe.</text:p>
      <text:p text:style-name="Text_20_body">Par exemple le même que celui de l'administrateur pour le labo (ce n'est pas une bonne pratique en production, mais pour un environnement de test, ça simplifie la vie).</text:p>
      <text:p text:style-name="P24"/>
      <text:h text:style-name="P21" text:outline-level="2">DNS Delegation</text:h>
      <text:p text:style-name="Text_20_body">Tu verras sûrement un avertissement jaune.</text:p>
      <text:p text:style-name="Text_20_body">C'est <text:span text:style-name="Strong_20_Emphasis">normal</text:span>.</text:p>
      <text:p text:style-name="Text_20_body">Tu peux simplement faire :</text:p>
      <text:section text:style-name="Sect1" text:name="Section24">
        <text:p text:style-name="P22"><text:bookmark text:name="code-block-viewer Copie 23"/><text:span text:style-name="Source_20_Text">Next</text:span></text:p>
      </text:section>
      <text:p text:style-name="P24"/>
      <text:h text:style-name="P20" text:outline-level="1">NetBIOS</text:h>
      <text:p text:style-name="Text_20_body">Windows propose automatiquement :</text:p>
      <text:section text:style-name="Sect1" text:name="Section25">
        <text:p text:style-name="P22"><text:bookmark text:name="code-block-viewer Copie 24"/><text:span text:style-name="Source_20_Text">LAB</text:span></text:p>
      </text:section>
      <text:p text:style-name="Text_20_body">ou</text:p>
      <text:section text:style-name="Sect1" text:name="Section26">
        <text:p text:style-name="P22"><text:bookmark text:name="code-block-viewer Copie 25"/><text:span text:style-name="Source_20_Text">AD</text:span></text:p>
      </text:section>
      <text:p text:style-name="Text_20_body">Laisse celui proposé.</text:p>
      <text:section text:style-name="Sect1" text:name="Section27">
        <text:p text:style-name="P22"><text:bookmark text:name="code-block-viewer Copie 26"/><text:span text:style-name="Source_20_Text">Next</text:span></text:p>
      </text:section>
      <text:p text:style-name="P24"/>
      <text:h text:style-name="P20" text:outline-level="1">Paths</text:h>
      <text:p text:style-name="Text_20_body">Laisser :</text:p>
      <text:section text:style-name="Sect1" text:name="Section28">
        <text:p text:style-name="P22"><text:bookmark text:name="code-block-viewer Copie 27"/><text:span text:style-name="Source_20_Text">Database</text:span></text:p>
        <text:p text:style-name="P23"/>
        <text:p text:style-name="P23"><text:soft-page-break/><text:span text:style-name="Source_20_Text">C:\Windows\NTDS</text:span></text:p>
      </text:section>
      <text:section text:style-name="Sect1" text:name="Section29">
        <text:p text:style-name="P22"><text:bookmark text:name="code-block-viewer Copie 28"/><text:span text:style-name="Source_20_Text">Logs</text:span></text:p>
        <text:p text:style-name="P23"/>
        <text:p text:style-name="P23"><text:span text:style-name="Source_20_Text">C:\Windows\NTDS</text:span></text:p>
      </text:section>
      <text:section text:style-name="Sect1" text:name="Section30">
        <text:p text:style-name="P22"><text:bookmark text:name="code-block-viewer Copie 29"/><text:span text:style-name="Source_20_Text">SYSVOL</text:span></text:p>
        <text:p text:style-name="P23"/>
        <text:p text:style-name="P23"><text:span text:style-name="Source_20_Text">C:\Windows\SYSVOL</text:span></text:p>
      </text:section>
      <text:section text:style-name="Sect1" text:name="Section31">
        <text:p text:style-name="P22"><text:bookmark text:name="code-block-viewer Copie 30"/><text:span text:style-name="Source_20_Text">Next</text:span></text:p>
      </text:section>
      <text:p text:style-name="P24"/>
      <text:h text:style-name="P20" text:outline-level="1">Review Options</text:h>
      <text:p text:style-name="Text_20_body">Vérifier rapidement.</text:p>
      <text:p text:style-name="Text_20_body">Puis :</text:p>
      <text:section text:style-name="Sect1" text:name="Section32">
        <text:p text:style-name="P22"><text:bookmark text:name="code-block-viewer Copie 31"/><text:span text:style-name="Source_20_Text">Next</text:span></text:p>
      </text:section>
      <text:p text:style-name="P24"/>
      <text:h text:style-name="P20" text:outline-level="1">Prerequisites Check</text:h>
      <text:p text:style-name="Text_20_body">Windows effectue des vérifications.</text:p>
      <text:p text:style-name="Text_20_body">Tu verras probablement plusieurs avertissements.</text:p>
      <text:p text:style-name="Text_20_body">C'est normal.</text:p>
      <text:p text:style-name="Text_20_body">S'il y a écrit :</text:p>
      <text:section text:style-name="Sect1" text:name="Section33">
        <text:p text:style-name="P22"><text:bookmark text:name="code-block-viewer Copie 32"/><text:span text:style-name="Source_20_Text">All prerequisite checks passed successfully.</text:span></text:p>
      </text:section>
      <text:p text:style-name="Text_20_body">ou un message équivalent indiquant que les vérifications sont satisfaisantes, tu peux continuer.</text:p>
      <text:p text:style-name="Text_20_body">Clique sur :</text:p>
      <text:section text:style-name="Sect1" text:name="Section34">
        <text:p text:style-name="P22"><text:bookmark text:name="code-block-viewer Copie 33"/><text:span text:style-name="Source_20_Text">Install</text:span></text:p>
      </text:section>
      <text:p text:style-name="P24"/>
      <text:h text:style-name="P20" text:outline-level="1">Installation</text:h>
      <text:p text:style-name="Text_20_body">Le serveur va :</text:p>
      <text:list text:style-name="L14">
        <text:list-item>
          <text:p text:style-name="P25">installer Active Directory ; </text:p>
        </text:list-item>
        <text:list-item>
          <text:p text:style-name="P25">installer DNS ; </text:p>
        </text:list-item>
        <text:list-item>
          <text:p text:style-name="P25">créer le domaine ; </text:p>
        </text:list-item>
        <text:list-item>
          <text:p text:style-name="P25">configurer SYSVOL ; </text:p>
        </text:list-item>
        <text:list-item>
          <text:p text:style-name="P26">promouvoir le serveur. </text:p>
        </text:list-item>
      </text:list>
      <text:p text:style-name="Text_20_body">Puis il redémarrera automatiquement.</text:p>
      <text:p text:style-name="P24"/>
      <text:h text:style-name="P20" text:outline-level="1"><text:soft-page-break/>Premier démarrage</text:h>
      <text:p text:style-name="Text_20_body">Au redémarrage :</text:p>
      <text:p text:style-name="Text_20_body">Tu verras :</text:p>
      <text:section text:style-name="Sect1" text:name="Section35">
        <text:p text:style-name="P22"><text:bookmark text:name="code-block-viewer Copie 34"/><text:span text:style-name="Source_20_Text">LAB\Administrator</text:span></text:p>
      </text:section>
      <text:p text:style-name="Text_20_body">ou</text:p>
      <text:section text:style-name="Sect1" text:name="Section36">
        <text:p text:style-name="P22"><text:bookmark text:name="code-block-viewer Copie 35"/><text:span text:style-name="Source_20_Text">administrator@lab.local</text:span></text:p>
      </text:section>
      <text:p text:style-name="Text_20_body">Tu te connectes normalement.</text:p>
      <text:p text:style-name="P24"/>
      <text:h text:style-name="P20" text:outline-level="1">Vérifications</text:h>
      <text:p text:style-name="Text_20_body">Dans <text:span text:style-name="Strong_20_Emphasis">Server Manager</text:span>, vérifie que tout est vert.</text:p>
      <text:p text:style-name="Text_20_body">Ensuite ouvre :</text:p>
      <text:section text:style-name="Sect1" text:name="Section37">
        <text:p text:style-name="P22"><text:bookmark text:name="code-block-viewer Copie 36"/><text:span text:style-name="Source_20_Text">Tools</text:span></text:p>
        <text:p text:style-name="P23"/>
        <text:p text:style-name="P23"><text:span text:style-name="Source_20_Text">↓</text:span></text:p>
        <text:p text:style-name="P23"/>
        <text:p text:style-name="P23"><text:span text:style-name="Source_20_Text">Active Directory Users and Computers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3T18:44:57.654977100</meta:creation-date>
    <meta:generator>LibreOffice/26.2.4.2$Windows_X86_64 LibreOffice_project/0229ac93fcf0d7cbc6376066c6f35021cef002dc</meta:generator>
    <dc:date>2026-07-23T18:50:21.576132900</dc:date>
    <meta:editing-duration>PT2M26S</meta:editing-duration>
    <meta:editing-cycles>2</meta:editing-cycles>
    <meta:document-statistic meta:table-count="0" meta:image-count="0" meta:object-count="0" meta:page-count="6" meta:paragraph-count="153" meta:word-count="526" meta:character-count="3103" meta:non-whitespace-character-count="2726"/>
  </office:meta>
</office:document-meta>
</file>