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66cm" table:align="left"/>
    </style:style>
    <style:style style:name="Tableau1.A" style:family="table-column">
      <style:table-column-properties style:column-width="6.077cm"/>
    </style:style>
    <style:style style:name="Tableau1.B" style:family="table-column">
      <style:table-column-properties style:column-width="10.58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Calibri Light" fo:font-size="12pt" style:font-size-asian="12pt" style:font-size-complex="12pt"/>
    </style:style>
    <style:style style:name="P2" style:family="paragraph" style:parent-style-name="Heading_20_2">
      <style:text-properties style:font-name="Calibri Light" fo:font-size="12pt" style:font-size-asian="12pt" style:font-size-complex="12pt"/>
    </style:style>
    <style:style style:name="P3" style:family="paragraph" style:parent-style-name="Text_20_body">
      <style:text-properties style:font-name="Calibri Light" fo:font-size="12pt" style:font-size-asian="12pt" style:font-size-complex="12pt"/>
    </style:style>
    <style:style style:name="P4" style:family="paragraph" style:parent-style-name="Table_20_Heading">
      <style:text-properties style:font-name="Calibri Light" fo:font-size="12pt" style:font-size-asian="12pt" style:font-size-complex="12pt"/>
    </style:style>
    <style:style style:name="P5" style:family="paragraph" style:parent-style-name="Table_20_Contents">
      <style:text-properties style:font-name="Calibri Light" fo:font-size="12pt" style:font-size-asian="12pt" style:font-size-complex="12pt"/>
    </style:style>
    <style:style style:name="P6" style:family="paragraph" style:parent-style-name="Horizontal_20_Line">
      <style:text-properties style:font-name="Calibri Light" fo:font-size="12p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Calibri Light" fo:font-size="12pt" style:font-size-asian="12pt" style:font-size-complex="12pt"/>
    </style:style>
    <style:style style:name="P8" style:family="paragraph" style:parent-style-name="Text_20_body" style:list-style-name="L1">
      <style:text-properties style:font-name="Calibri Light" fo:font-size="12pt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Calibri Light" fo:font-size="12pt" style:font-size-asian="12pt" style:font-size-complex="12pt"/>
    </style:style>
    <style:style style:name="P10" style:family="paragraph" style:parent-style-name="Text_20_body" style:list-style-name="L2">
      <style:text-properties style:font-name="Calibri Light" fo:font-size="12pt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font-name="Calibri Light" fo:font-size="12pt" style:font-size-asian="12pt" style:font-size-complex="12pt"/>
    </style:style>
    <style:style style:name="P12" style:family="paragraph" style:parent-style-name="Text_20_body" style:list-style-name="L3">
      <style:text-properties style:font-name="Calibri Light" fo:font-size="12pt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Calibri Light" fo:font-size="12pt" style:font-size-asian="12pt" style:font-size-complex="12pt"/>
    </style:style>
    <style:style style:name="P14" style:family="paragraph" style:parent-style-name="Text_20_body" style:list-style-name="L4">
      <style:text-properties style:font-name="Calibri Light" fo:font-size="12pt" style:font-size-asian="12pt" style:font-size-complex="12pt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style:font-name="Calibri Light" fo:font-size="12pt" style:font-size-asian="12pt" style:font-size-complex="12pt"/>
    </style:style>
    <style:style style:name="P16" style:family="paragraph" style:parent-style-name="Text_20_body" style:list-style-name="L5">
      <style:text-properties style:font-name="Calibri Light" fo:font-size="12pt" style:font-size-asian="12pt" style:font-size-complex="12pt"/>
    </style:style>
    <style:style style:name="P17" style:family="paragraph" style:parent-style-name="Standard">
      <style:text-properties style:font-name="Calibri Light" fo:font-size="12pt" style:font-size-asian="12pt" style:font-size-complex="12pt"/>
    </style:style>
    <style:style style:name="T1" style:family="text">
      <style:text-properties style:font-name="Calibri Light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vironnement de travail</text:h>
      <text:h text:style-name="P2" text:outline-level="2">Objectif</text:h>
      <text:p text:style-name="P3">Ce projet vise à automatiser la gestion des utilisateurs Active Directory à l'aide de scripts PowerShell et Bash dans un environnement virtualisé.</text:p>
      <text:p text:style-name="P3">Afin de reproduire un contexte proche d'une infrastructure d'entreprise, plusieurs outils sont utilisés.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4">Outil</text:p>
            </table:table-cell>
            <table:table-cell table:style-name="Tableau1.A1" office:value-type="string">
              <text:p text:style-name="P4">Rôle</text:p>
            </table:table-cell>
          </table:table-row>
        </table:table-header-rows>
        <table:table-row>
          <table:table-cell table:style-name="Tableau1.A1" office:value-type="string">
            <text:p text:style-name="P5">Oracle VirtualBox</text:p>
          </table:table-cell>
          <table:table-cell table:style-name="Tableau1.A1" office:value-type="string">
            <text:p text:style-name="P5">Héberger les machines virtuelles du laboratoire</text:p>
          </table:table-cell>
        </table:table-row>
        <table:table-row>
          <table:table-cell table:style-name="Tableau1.A1" office:value-type="string">
            <text:p text:style-name="P5">Windows Server 2022</text:p>
          </table:table-cell>
          <table:table-cell table:style-name="Tableau1.A1" office:value-type="string">
            <text:p text:style-name="P5">Héberger Active Directory et exécuter les scripts PowerShell</text:p>
          </table:table-cell>
        </table:table-row>
        <table:table-row>
          <table:table-cell table:style-name="Tableau1.A1" office:value-type="string">
            <text:p text:style-name="P5">Ubuntu Server</text:p>
          </table:table-cell>
          <table:table-cell table:style-name="Tableau1.A1" office:value-type="string">
            <text:p text:style-name="P5">Simuler un serveur Linux et exécuter les scripts Bash</text:p>
          </table:table-cell>
        </table:table-row>
        <table:table-row>
          <table:table-cell table:style-name="Tableau1.A1" office:value-type="string">
            <text:p text:style-name="P5">Active Directory Domain Services</text:p>
          </table:table-cell>
          <table:table-cell table:style-name="Tableau1.A1" office:value-type="string">
            <text:p text:style-name="P5">Gérer les utilisateurs, groupes et unités d'organisation</text:p>
          </table:table-cell>
        </table:table-row>
        <table:table-row>
          <table:table-cell table:style-name="Tableau1.A1" office:value-type="string">
            <text:p text:style-name="P5">DNS</text:p>
          </table:table-cell>
          <table:table-cell table:style-name="Tableau1.A1" office:value-type="string">
            <text:p text:style-name="P5">Assurer la résolution de noms du domaine Active Directory</text:p>
          </table:table-cell>
        </table:table-row>
        <table:table-row>
          <table:table-cell table:style-name="Tableau1.A1" office:value-type="string">
            <text:p text:style-name="P5">PowerShell</text:p>
          </table:table-cell>
          <table:table-cell table:style-name="Tableau1.A1" office:value-type="string">
            <text:p text:style-name="P5">Automatiser l'administration de Windows Server</text:p>
          </table:table-cell>
        </table:table-row>
        <table:table-row>
          <table:table-cell table:style-name="Tableau1.A1" office:value-type="string">
            <text:p text:style-name="P5">Bash</text:p>
          </table:table-cell>
          <table:table-cell table:style-name="Tableau1.A1" office:value-type="string">
            <text:p text:style-name="P5">Automatiser les tâches côté Linux</text:p>
          </table:table-cell>
        </table:table-row>
        <table:table-row>
          <table:table-cell table:style-name="Tableau1.A1" office:value-type="string">
            <text:p text:style-name="P5">Git</text:p>
          </table:table-cell>
          <table:table-cell table:style-name="Tableau1.A1" office:value-type="string">
            <text:p text:style-name="P5">Versionner le projet</text:p>
          </table:table-cell>
        </table:table-row>
        <table:table-row>
          <table:table-cell table:style-name="Tableau1.A1" office:value-type="string">
            <text:p text:style-name="P5">GitHub</text:p>
          </table:table-cell>
          <table:table-cell table:style-name="Tableau1.A1" office:value-type="string">
            <text:p text:style-name="P5">Héberger le code source</text:p>
          </table:table-cell>
        </table:table-row>
        <table:table-row>
          <table:table-cell table:style-name="Tableau1.A1" office:value-type="string">
            <text:p text:style-name="P5">Visual Studio Code</text:p>
          </table:table-cell>
          <table:table-cell table:style-name="Tableau1.A1" office:value-type="string">
            <text:p text:style-name="P5">Éditer les scripts et la documentation</text:p>
          </table:table-cell>
        </table:table-row>
        <table:table-row>
          <table:table-cell table:style-name="Tableau1.A1" office:value-type="string">
            <text:p text:style-name="P5">CSV</text:p>
          </table:table-cell>
          <table:table-cell table:style-name="Tableau1.A1" office:value-type="string">
            <text:p text:style-name="P5">Fournir les données des utilisateurs à créer</text:p>
          </table:table-cell>
        </table:table-row>
      </table:table>
      <text:p text:style-name="P6"/>
      <text:p text:style-name="P3">Ensuite, je consacrerais une petite section à chaque outil.</text:p>
      <text:h text:style-name="P2" text:outline-level="2">Oracle VirtualBox</text:h>
      <text:p text:style-name="Text_20_body"><text:span text:style-name="Strong_20_Emphasis"><text:span text:style-name="T1">Pourquoi ?</text:span></text:span></text:p>
      <text:p text:style-name="P3">VirtualBox permet de créer un laboratoire virtuel sans nécessiter plusieurs ordinateurs physiques.</text:p>
      <text:p text:style-name="P3">Il offre la possibilité de :</text:p>
      <text:list text:style-name="L1">
        <text:list-item>
          <text:p text:style-name="P7">créer plusieurs machines virtuelles ; </text:p>
        </text:list-item>
        <text:list-item>
          <text:p text:style-name="P7">configurer différents types de réseaux (NAT, réseau interne, pont...) ; </text:p>
        </text:list-item>
        <text:list-item>
          <text:p text:style-name="P7">effectuer des instantanés (snapshots) avant des manipulations importantes ; </text:p>
        </text:list-item>
        <text:list-item>
          <text:p text:style-name="P8">simuler une infrastructure d'entreprise. </text:p>
        </text:list-item>
      </text:list>
      <text:p text:style-name="P6"/>
      <text:h text:style-name="P2" text:outline-level="2">Windows Server 2022</text:h>
      <text:p text:style-name="Text_20_body"><text:span text:style-name="Strong_20_Emphasis"><text:span text:style-name="T1">Pourquoi ?</text:span></text:span></text:p>
      <text:p text:style-name="P3">Windows Server est le système d'exploitation utilisé pour héberger Active Directory.</text:p>
      <text:p text:style-name="P3">Dans ce projet, il servira à :</text:p>
      <text:list text:style-name="L2">
        <text:list-item>
          <text:p text:style-name="P9"><text:soft-page-break/>installer le rôle Active Directory Domain Services ; </text:p>
        </text:list-item>
        <text:list-item>
          <text:p text:style-name="P9">créer le domaine ; </text:p>
        </text:list-item>
        <text:list-item>
          <text:p text:style-name="P9">gérer les utilisateurs ; </text:p>
        </text:list-item>
        <text:list-item>
          <text:p text:style-name="P10">exécuter les scripts PowerShell. </text:p>
        </text:list-item>
      </text:list>
      <text:p text:style-name="P6"/>
      <text:h text:style-name="P2" text:outline-level="2">Ubuntu Server</text:h>
      <text:p text:style-name="Text_20_body"><text:span text:style-name="Strong_20_Emphasis"><text:span text:style-name="T1">Pourquoi ?</text:span></text:span></text:p>
      <text:p text:style-name="P3">Le serveur Linux permettra de développer les scripts Bash du projet.</text:p>
      <text:p text:style-name="P3">Il simulera notamment :</text:p>
      <text:list text:style-name="L3">
        <text:list-item>
          <text:p text:style-name="P11">la création des dossiers utilisateurs ; </text:p>
        </text:list-item>
        <text:list-item>
          <text:p text:style-name="P11">la gestion des permissions ; </text:p>
        </text:list-item>
        <text:list-item>
          <text:p text:style-name="P12">les sauvegardes automatiques. </text:p>
        </text:list-item>
      </text:list>
      <text:p text:style-name="P6"/>
      <text:h text:style-name="P2" text:outline-level="2">Active Directory</text:h>
      <text:p text:style-name="Text_20_body"><text:span text:style-name="Strong_20_Emphasis"><text:span text:style-name="T1">Pourquoi ?</text:span></text:span></text:p>
      <text:p text:style-name="P3">Active Directory centralise l'administration des ressources d'une entreprise.</text:p>
      <text:p text:style-name="P3">Le projet automatisera notamment :</text:p>
      <text:list text:style-name="L4">
        <text:list-item>
          <text:p text:style-name="P13">la création des comptes ; </text:p>
        </text:list-item>
        <text:list-item>
          <text:p text:style-name="P13">l'ajout dans les groupes ; </text:p>
        </text:list-item>
        <text:list-item>
          <text:p text:style-name="P13">la désactivation ; </text:p>
        </text:list-item>
        <text:list-item>
          <text:p text:style-name="P14">la suppression. </text:p>
        </text:list-item>
      </text:list>
      <text:p text:style-name="P6"/>
      <text:h text:style-name="P2" text:outline-level="2">PowerShell</text:h>
      <text:p text:style-name="Text_20_body"><text:span text:style-name="Strong_20_Emphasis"><text:span text:style-name="T1">Pourquoi ?</text:span></text:span></text:p>
      <text:p text:style-name="P3">PowerShell est le langage d'administration natif de Windows.</text:p>
      <text:p text:style-name="P3">Il permet d'interagir directement avec Active Directory grâce au module ActiveDirectory.</text:p>
      <text:p text:style-name="P3">Les scripts développés réaliseront les opérations d'administration de manière automatisée.</text:p>
      <text:p text:style-name="P6"/>
      <text:h text:style-name="P2" text:outline-level="2">Bash</text:h>
      <text:p text:style-name="Text_20_body"><text:span text:style-name="Strong_20_Emphasis"><text:span text:style-name="T1">Pourquoi ?</text:span></text:span></text:p>
      <text:p text:style-name="P3">Bash est l'interpréteur de commandes standard sous Linux.</text:p>
      <text:p text:style-name="P3"><text:soft-page-break/>Il sera utilisé pour automatiser les tâches liées aux serveurs Linux, comme la création de répertoires, l'application des droits et les sauvegardes.</text:p>
      <text:p text:style-name="P6"/>
      <text:h text:style-name="P2" text:outline-level="2">Git et GitHub</text:h>
      <text:p text:style-name="Text_20_body"><text:span text:style-name="Strong_20_Emphasis"><text:span text:style-name="T1">Pourquoi ?</text:span></text:span></text:p>
      <text:p text:style-name="P3">Git permet de suivre l'évolution du projet et de conserver un historique des modifications.</text:p>
      <text:p text:style-name="P3">GitHub sert de plateforme de partage et facilite la collaboration, la revue de code et la présentation du projet dans un portfolio.</text:p>
      <text:p text:style-name="P6"/>
      <text:h text:style-name="P2" text:outline-level="2">Visual Studio Code</text:h>
      <text:p text:style-name="Text_20_body"><text:span text:style-name="Strong_20_Emphasis"><text:span text:style-name="T1">Pourquoi ?</text:span></text:span></text:p>
      <text:p text:style-name="P3">Visual Studio Code sera utilisé comme environnement de développement pour :</text:p>
      <text:list text:style-name="L5">
        <text:list-item>
          <text:p text:style-name="P15">écrire les scripts PowerShell ; </text:p>
        </text:list-item>
        <text:list-item>
          <text:p text:style-name="P15">développer les scripts Bash ; </text:p>
        </text:list-item>
        <text:list-item>
          <text:p text:style-name="P15">rédiger la documentation au format Markdown ; </text:p>
        </text:list-item>
        <text:list-item>
          <text:p text:style-name="P16">gérer le dépôt Git grâce à ses extensions intégrées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1T15:57:44.024786000</meta:creation-date>
    <dc:date>2026-07-21T15:58:43.129554700</dc:date>
    <meta:editing-duration>PT1M</meta:editing-duration>
    <meta:editing-cycles>1</meta:editing-cycles>
    <meta:document-statistic meta:table-count="1" meta:image-count="0" meta:object-count="0" meta:page-count="3" meta:paragraph-count="80" meta:word-count="464" meta:character-count="3050" meta:non-whitespace-character-count="2667"/>
    <meta:generator>LibreOffice/26.2.4.2$Windows_X86_64 LibreOffice_project/0229ac93fcf0d7cbc6376066c6f35021cef002dc</meta:generator>
  </office:meta>
</office:document-meta>
</file>